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textarea-horizontal-align="justify" draw:textarea-vertical-align="middle" draw:auto-grow-height="false" fo:min-height="2.019cm" fo:min-width="2.126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draw:fill="none" fo:min-height="0.551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3.75cm" loext:decorative="false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1.876cm" fo:min-width="1.876cm" loext:decorative="false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2.019cm" fo:min-width="2.126cm" loext:decorative="false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876cm" fo:min-width="2.75cm" loext:decorative="false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1.876cm" fo:min-width="2.625cm" loext:decorative="false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1.876cm" fo:min-width="1.876cm" loext:decorative="false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1.876cm" fo:min-width="1.876cm" loext:decorative="false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1.876cm" fo:min-width="2.62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ize="12pt" fo:letter-spacing="-0.007cm" style:text-scale="93%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T1" style:family="text">
      <style:text-properties fo:font-size="12pt" fo:letter-spacing="-0.007cm" style:text-scale="93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custom-shape draw:style-name="gr1" draw:text-style-name="P1" draw:layer="layout" svg:width="5.25cm" svg:height="4.537cm" svg:x="20.25cm" svg:y="4.25cm">
          <text:p text:style-name="P1"><text:span text:style-name="T1">Включить геолокацию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line draw:style-name="gr2" draw:text-style-name="P2" draw:layer="layout" svg:x1="23cm" svg:y1="11.75cm" svg:x2="23cm" svg:y2="8.787cm">
          <text:p/>
        </draw:line>
        <draw:line draw:style-name="gr2" draw:text-style-name="P2" draw:layer="layout" svg:x1="28cm" svg:y1="6.5cm" svg:x2="25.25cm" svg:y2="6.5cm">
          <text:p/>
        </draw:line>
        <draw:frame draw:style-name="gr3" draw:text-style-name="P3" draw:layer="layout" svg:width="2cm" svg:height="0.962cm" svg:x="12cm" svg:y="16.288cm">
          <draw:text-box>
            <text:p>НЕТ</text:p>
          </draw:text-box>
        </draw:frame>
        <draw:frame draw:style-name="gr4" draw:text-style-name="P3" draw:layer="layout" svg:width="1.5cm" svg:height="0.963cm" svg:x="35.75cm" svg:y="14.787cm">
          <draw:text-box>
            <text:p>ДА</text:p>
          </draw:text-box>
        </draw:frame>
        <draw:custom-shape draw:style-name="gr5" draw:text-style-name="P4" draw:layer="layout" svg:width="4.25cm" svg:height="2cm" svg:x="16.25cm" svg:y="11.75cm">
          <text:p text:style-name="P4">Будильник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5cm" svg:height="2cm" svg:x="21cm" svg:y="11.75cm">
          <text:p text:style-name="P4">Секундомер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5cm" svg:height="2cm" svg:x="25.5cm" svg:y="11.75cm">
          <text:p text:style-name="P4">Мир. время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5cm" svg:height="2cm" svg:x="21cm" svg:y="11.75cm">
          <text:p text:style-name="P4">Секундомер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5cm" svg:height="2cm" svg:x="28cm" svg:y="5.287cm">
          <text:p text:style-name="P4">Выход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3cm" svg:y1="13.75cm" svg:x2="23cm" svg:y2="16.25cm">
          <text:p/>
        </draw:line>
        <draw:custom-shape draw:style-name="gr6" draw:text-style-name="P1" draw:layer="layout" svg:width="4.75cm" svg:height="4.25cm" svg:x="20.75cm" svg:y="15cm">
          <text:p text:style-name="P1"><text:span text:style-name="T1">Нажать старт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7" draw:text-style-name="P1" draw:layer="layout" svg:width="5.25cm" svg:height="4.537cm" svg:x="20.251cm" svg:y="4.25cm">
          <text:p text:style-name="P1"><text:span text:style-name="T1">Включить геолокацию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5" draw:text-style-name="P4" draw:layer="layout" svg:width="4.25cm" svg:height="2cm" svg:x="21cm" svg:y="21.5cm">
          <text:p text:style-name="P4">Измен. счетчика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3.25cm" svg:y1="19.25cm" svg:x2="23.25cm" svg:y2="21.75cm">
          <text:p/>
        </draw:line>
        <draw:frame draw:style-name="gr4" draw:text-style-name="P3" draw:layer="layout" svg:width="1.5cm" svg:height="0.963cm" svg:x="22cm" svg:y="19.25cm">
          <draw:text-box>
            <text:p>ДА</text:p>
          </draw:text-box>
        </draw:frame>
        <draw:line draw:style-name="gr2" draw:text-style-name="P2" draw:layer="layout" svg:x1="25.5cm" svg:y1="17.25cm" svg:x2="33cm" svg:y2="17.25cm">
          <text:p/>
        </draw:line>
        <draw:line draw:style-name="gr2" draw:text-style-name="P2" draw:layer="layout" svg:x1="33cm" svg:y1="17.25cm" svg:x2="33cm" svg:y2="10.5cm">
          <text:p/>
        </draw:line>
        <draw:line draw:style-name="gr2" draw:text-style-name="P2" draw:layer="layout" svg:x1="26.25cm" svg:y1="10.5cm" svg:x2="33cm" svg:y2="10.5cm">
          <text:p/>
        </draw:line>
        <draw:custom-shape draw:style-name="gr5" draw:text-style-name="P4" draw:layer="layout" svg:width="4.25cm" svg:height="2cm" svg:x="21cm" svg:y="21.5cm">
          <text:p text:style-name="P4">Измен. счетчика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5cm" svg:height="4.25cm" svg:x="13.75cm" svg:y="15cm">
          <text:p text:style-name="P1"><text:span text:style-name="T1">Редактировать</text:span><text:span text:style-name="T1"><text:line-break/></text:span><text:span text:style-name="T1"> будильник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9" draw:text-style-name="P1" draw:layer="layout" svg:width="6.249cm" svg:height="4.25cm" svg:x="8cm" svg:y="7cm">
          <text:p text:style-name="P1"><text:span text:style-name="T1">Добавить будильник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line draw:style-name="gr2" draw:text-style-name="P2" draw:layer="layout" svg:x1="17cm" svg:y1="13.75cm" svg:x2="17cm" svg:y2="15.25cm">
          <text:p/>
        </draw:line>
        <draw:line draw:style-name="gr2" draw:text-style-name="P2" draw:layer="layout" svg:x1="17cm" svg:y1="19.25cm" svg:x2="17cm" svg:y2="21.5cm">
          <text:p/>
        </draw:line>
        <draw:custom-shape draw:style-name="gr5" draw:text-style-name="P4" draw:layer="layout" svg:width="4.25cm" svg:height="2cm" svg:x="21cm" svg:y="21.501cm">
          <text:p text:style-name="P4">Измен. счетчика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5cm" svg:height="0.963cm" svg:x="23cm" svg:y="9cm">
          <draw:text-box>
            <text:p>ДА</text:p>
          </draw:text-box>
        </draw:frame>
        <draw:custom-shape draw:style-name="gr5" draw:text-style-name="P4" draw:layer="layout" svg:width="4.25cm" svg:height="2cm" svg:x="33.75cm" svg:y="17.5cm">
          <text:p text:style-name="P4">+1 час пояс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5cm" svg:height="2cm" svg:x="14.25cm" svg:y="21.499cm">
          <text:p text:style-name="P4">Измен. счетчика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5cm" svg:height="0.963cm" svg:x="15.5cm" svg:y="19.287cm">
          <draw:text-box>
            <text:p>ДА</text:p>
          </draw:text-box>
        </draw:frame>
        <draw:custom-shape draw:style-name="gr5" draw:text-style-name="P4" draw:layer="layout" svg:width="4.25cm" svg:height="2cm" svg:x="14.25cm" svg:y="21.499cm">
          <text:p text:style-name="P4">Измен. счетчика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5cm" svg:height="2cm" svg:x="14.25cm" svg:y="21.5cm">
          <text:p text:style-name="P4">Измен. времени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5cm" svg:y1="17.25cm" svg:x2="13.75cm" svg:y2="17.25cm">
          <text:p/>
        </draw:line>
        <draw:line draw:style-name="gr2" draw:text-style-name="P2" draw:layer="layout" svg:x1="17cm" svg:y1="13.75cm" svg:x2="17cm" svg:y2="15.25cm">
          <text:p/>
        </draw:line>
        <draw:line draw:style-name="gr2" draw:text-style-name="P2" draw:layer="layout" svg:x1="9.5cm" svg:y1="17.25cm" svg:x2="9.5cm" svg:y2="12.75cm">
          <text:p/>
        </draw:line>
        <draw:line draw:style-name="gr2" draw:text-style-name="P2" draw:layer="layout" svg:x1="16.25cm" svg:y1="12.75cm" svg:x2="9.5cm" svg:y2="12.75cm">
          <text:p/>
        </draw:line>
        <draw:line draw:style-name="gr2" draw:text-style-name="P2" draw:layer="layout" svg:x1="17cm" svg:y1="9cm" svg:x2="17cm" svg:y2="11.75cm">
          <text:p/>
        </draw:line>
        <draw:line draw:style-name="gr2" draw:text-style-name="P2" draw:layer="layout" svg:x1="17cm" svg:y1="9cm" svg:x2="14cm" svg:y2="9cm">
          <text:p/>
        </draw:line>
        <draw:line draw:style-name="gr2" draw:text-style-name="P2" draw:layer="layout" svg:x1="11cm" svg:y1="11cm" svg:x2="11cm" svg:y2="12.25cm">
          <text:p/>
        </draw:line>
        <draw:frame draw:style-name="gr3" draw:text-style-name="P3" draw:layer="layout" svg:width="2cm" svg:height="0.962cm" svg:x="11.25cm" svg:y="11.25cm">
          <draw:text-box>
            <text:p>НЕТ</text:p>
          </draw:text-box>
        </draw:frame>
        <draw:line draw:style-name="gr2" draw:text-style-name="P2" draw:layer="layout" svg:x1="16.25cm" svg:y1="12.25cm" svg:x2="11cm" svg:y2="12.25cm">
          <text:p/>
        </draw:line>
        <draw:line draw:style-name="gr2" draw:text-style-name="P2" draw:layer="layout" svg:x1="11cm" svg:y1="5cm" svg:x2="11cm" svg:y2="7cm">
          <text:p/>
        </draw:line>
        <draw:frame draw:style-name="gr4" draw:text-style-name="P3" draw:layer="layout" svg:width="1.5cm" svg:height="0.963cm" svg:x="11cm" svg:y="6.037cm">
          <draw:text-box>
            <text:p>ДА</text:p>
          </draw:text-box>
        </draw:frame>
        <draw:line draw:style-name="gr2" draw:text-style-name="P2" draw:layer="layout" svg:x1="26.25cm" svg:y1="10.5cm" svg:x2="18.75cm" svg:y2="10.5cm">
          <text:p/>
        </draw:line>
        <draw:line draw:style-name="gr2" draw:text-style-name="P2" draw:layer="layout" svg:x1="18.75cm" svg:y1="11.75cm" svg:x2="18.75cm" svg:y2="10.5cm">
          <text:p/>
        </draw:line>
        <draw:line draw:style-name="gr2" draw:text-style-name="P2" draw:layer="layout" svg:x1="27cm" svg:y1="11.75cm" svg:x2="27cm" svg:y2="10.5cm">
          <text:p/>
        </draw:line>
        <draw:custom-shape draw:style-name="gr10" draw:text-style-name="P1" draw:layer="layout" svg:width="4.75cm" svg:height="4.25cm" svg:x="33.5cm" svg:y="10.75cm">
          <text:p text:style-name="P1"><text:span text:style-name="T1">Добавить часовой пояс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line draw:style-name="gr2" draw:text-style-name="P2" draw:layer="layout" svg:x1="29.75cm" svg:y1="12.75cm" svg:x2="33.75cm" svg:y2="12.75cm">
          <text:p/>
        </draw:line>
        <draw:custom-shape draw:style-name="gr11" draw:text-style-name="P1" draw:layer="layout" svg:width="4.75cm" svg:height="4.25cm" svg:x="20.751cm" svg:y="15.001cm">
          <text:p text:style-name="P1"><text:span text:style-name="T1">Нажать старт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line draw:style-name="gr2" draw:text-style-name="P2" draw:layer="layout" svg:x1="35.75cm" svg:y1="17.5cm" svg:x2="35.75cm" svg:y2="15cm">
          <text:p/>
        </draw:line>
        <draw:line draw:style-name="gr2" draw:text-style-name="P2" draw:layer="layout" svg:x1="33cm" svg:y1="17.25cm" svg:x2="33cm" svg:y2="10.5cm">
          <text:p/>
        </draw:line>
        <draw:line draw:style-name="gr2" draw:text-style-name="P2" draw:layer="layout" svg:x1="35.75cm" svg:y1="11cm" svg:x2="35.75cm" svg:y2="9cm">
          <text:p/>
        </draw:line>
        <draw:frame draw:style-name="gr3" draw:text-style-name="P3" draw:layer="layout" svg:width="2cm" svg:height="0.962cm" svg:x="25.5cm" svg:y="16.288cm">
          <draw:text-box>
            <text:p>НЕТ</text:p>
          </draw:text-box>
        </draw:frame>
        <draw:line draw:style-name="gr2" draw:text-style-name="P2" draw:layer="layout" svg:x1="60.25cm" svg:y1="9.538cm" svg:x2="60.25cm" svg:y2="6.788cm">
          <text:p/>
        </draw:line>
        <draw:line draw:style-name="gr2" draw:text-style-name="P2" draw:layer="layout" svg:x1="27cm" svg:y1="9cm" svg:x2="35.75cm" svg:y2="9cm">
          <text:p/>
        </draw:line>
        <draw:line draw:style-name="gr2" draw:text-style-name="P2" draw:layer="layout" svg:x1="27cm" svg:y1="9cm" svg:x2="27cm" svg:y2="10.5cm">
          <text:p/>
        </draw:line>
        <draw:line draw:style-name="gr2" draw:text-style-name="P2" draw:layer="layout" svg:x1="27cm" svg:y1="9cm" svg:x2="27cm" svg:y2="10.5cm">
          <text:p/>
        </draw:line>
        <draw:line draw:style-name="gr2" draw:text-style-name="P2" draw:layer="layout" svg:x1="27cm" svg:y1="9cm" svg:x2="18.75cm" svg:y2="9cm">
          <text:p/>
        </draw:line>
        <draw:line draw:style-name="gr2" draw:text-style-name="P2" draw:layer="layout" svg:x1="18.75cm" svg:y1="10.5cm" svg:x2="18.75cm" svg:y2="9cm">
          <text:p/>
        </draw:line>
        <draw:line draw:style-name="gr2" draw:text-style-name="P2" draw:layer="layout" svg:x1="27cm" svg:y1="9cm" svg:x2="18.75cm" svg:y2="9cm">
          <text:p/>
        </draw:line>
        <draw:frame draw:style-name="gr3" draw:text-style-name="P3" draw:layer="layout" svg:width="2cm" svg:height="0.962cm" svg:x="35.75cm" svg:y="9.75cm">
          <draw:text-box>
            <text:p>НЕТ</text:p>
          </draw:text-box>
        </draw:frame>
        <draw:custom-shape draw:style-name="gr12" draw:text-style-name="P1" draw:layer="layout" svg:width="6.249cm" svg:height="4.25cm" svg:x="8cm" svg:y="7.001cm">
          <text:p text:style-name="P1"><text:span text:style-name="T1">Добавить будильник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5" draw:text-style-name="P4" draw:layer="layout" svg:width="4.25cm" svg:height="2cm" svg:x="8.75cm" svg:y="3cm">
          <text:p text:style-name="P4">+1 будильник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5cm" svg:height="2cm" svg:x="28cm" svg:y="5.287cm">
          <text:p text:style-name="P4">Выход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cm" svg:height="0.962cm" svg:x="25.25cm" svg:y="5.75cm">
          <draw:text-box>
            <text:p>НЕТ</text:p>
          </draw:text-box>
        </draw:frame>
        <draw:frame draw:style-name="gr3" draw:text-style-name="P3" draw:layer="layout" svg:width="2cm" svg:height="0.962cm" svg:x="25.5cm" svg:y="16.288cm">
          <draw:text-box>
            <text:p>НЕТ</text:p>
          </draw:text-box>
        </draw:frame>
        <draw:frame draw:style-name="gr3" draw:text-style-name="P3" draw:layer="layout" svg:width="2cm" svg:height="0.962cm" svg:x="25.5cm" svg:y="16.288cm">
          <draw:text-box>
            <text:p>НЕТ</text:p>
          </draw:text-box>
        </draw:frame>
        <draw:line draw:style-name="gr2" draw:text-style-name="P2" draw:layer="layout" svg:x1="14.25cm" svg:y1="21.5cm" svg:x2="8.75cm" svg:y2="21.5cm">
          <text:p/>
        </draw:line>
        <draw:line draw:style-name="gr2" draw:text-style-name="P2" draw:layer="layout" svg:x1="8.75cm" svg:y1="12.5cm" svg:x2="8.75cm" svg:y2="21.5cm">
          <text:p/>
        </draw:line>
        <draw:line draw:style-name="gr2" draw:text-style-name="P2" draw:layer="layout" svg:x1="8.75cm" svg:y1="12.5cm" svg:x2="16.25cm" svg:y2="12.5cm">
          <text:p/>
        </draw:line>
        <draw:line draw:style-name="gr2" draw:text-style-name="P2" draw:layer="layout" svg:x1="21cm" svg:y1="21.5cm" svg:x2="21cm" svg:y2="13.5cm">
          <text:p/>
        </draw:line>
        <draw:line draw:style-name="gr2" draw:text-style-name="P2" draw:layer="layout" svg:x1="13cm" svg:y1="4.75cm" svg:x2="17.5cm" svg:y2="4.75cm">
          <text:p/>
        </draw:line>
        <draw:line draw:style-name="gr2" draw:text-style-name="P2" draw:layer="layout" svg:x1="17.5cm" svg:y1="11.75cm" svg:x2="17.5cm" svg:y2="4.75cm">
          <text:p/>
        </draw:line>
        <draw:line draw:style-name="gr2" draw:text-style-name="P2" draw:layer="layout" svg:x1="28.5cm" svg:y1="17.5cm" svg:x2="33.75cm" svg:y2="17.5cm">
          <text:p/>
        </draw:line>
        <draw:line draw:style-name="gr2" draw:text-style-name="P2" draw:layer="layout" svg:x1="28.5cm" svg:y1="17.5cm" svg:x2="28.5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0.73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19T18:34:08.190000000</dc:date>
    <dc:language>ru-RU</dc:language>
    <meta:creation-date>2024-03-01T04:02:16Z</meta:creation-date>
    <meta:initial-creator>Бородина Анастасия Владимировна</meta:initial-creator>
    <meta:generator>LibreOffice/24.2.0.3$Windows_X86_64 LibreOffice_project/da48488a73ddd66ea24cf16bbc4f7b9c08e9bea1</meta:generator>
    <meta:editing-duration>PT8M6S</meta:editing-duration>
    <meta:editing-cycles>1</meta:editing-cycles>
    <meta:document-statistic meta:object-count="74"/>
  </office:meta>
</office:document-meta>
</file>